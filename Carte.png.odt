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E000005A84E1CB6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408cm, 0cm, 0.27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cm" svg:y="-2cm" svg:width="20.842cm" svg:height="29.7cm" draw:z-index="0"><draw:image xlink:href="Pictures/100000000000043E000005A84E1CB6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22:40:38.594727256</meta:creation-date>
    <dc:date>2026-05-01T22:43:06.574694964</dc:date>
    <meta:editing-duration>PT2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