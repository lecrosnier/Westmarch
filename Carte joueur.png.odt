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E000005A84E1CB6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color="#2a6099" loext:opacity="100%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2a6099" loext:opacity="100%"/>
    </style:style>
    <style:style style:name="T2" style:family="text">
      <style:text-properties fo:font-size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408cm, 0cm, 0.27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2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8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4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42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1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Cadre de texte 1" draw:style-name="gr9" draw:text-style-name="P2" svg:width="3.239cm" svg:height="0.514cm" svg:x="1.392cm" svg:y="2cm"><draw:text-box><text:p>Port Néréide</text:p></draw:text-box></draw:frame><draw:frame text:anchor-type="paragraph" draw:z-index="2" draw:name="Cadre de texte 2" draw:style-name="gr8" draw:text-style-name="P5" svg:width="4.266cm" svg:height="0.95cm" svg:x="-0.069cm" svg:y="-0.843cm"><draw:text-box><text:p><text:span text:style-name="T4">Mer Intérieur</text:span></text:p></draw:text-box></draw:frame><draw:frame text:anchor-type="paragraph" draw:z-index="3" draw:name="Cadre de texte 3" draw:style-name="gr3" draw:text-style-name="P2" svg:width="3.121cm" svg:height="0.75cm" svg:x="12.093cm" svg:y="5.121cm"><draw:text-box><text:p>Cendregarde</text:p></draw:text-box></draw:frame><draw:frame text:anchor-type="paragraph" draw:z-index="4" draw:name="Cadre de texte 4" draw:style-name="gr7" draw:text-style-name="P4" svg:width="3.081cm" svg:height="1.422cm" svg:x="15.529cm" svg:y="1.21cm"><draw:text-box><text:p><text:span text:style-name="T3">Forêt Epineuse</text:span></text:p></draw:text-box></draw:frame><draw:frame text:anchor-type="paragraph" draw:z-index="5" draw:name="Cadre de texte 5" draw:style-name="gr6" draw:text-style-name="P4" svg:width="2.962cm" svg:height="1.301cm" svg:x="10.119cm" svg:y="-0.566cm"><draw:text-box><text:p><text:span text:style-name="T3">Monts Brisés</text:span></text:p></draw:text-box></draw:frame><draw:frame text:anchor-type="paragraph" draw:z-index="6" draw:name="Cadre de texte 6" draw:style-name="gr6" draw:text-style-name="P4" svg:width="3.673cm" svg:height="1.301cm" svg:x="6.052cm" svg:y="2.672cm"><draw:text-box><text:p><text:span text:style-name="T3">Landes Sifflantes</text:span></text:p></draw:text-box></draw:frame><draw:frame text:anchor-type="paragraph" draw:z-index="7" draw:name="Cadre de texte 7" draw:style-name="gr5" draw:text-style-name="P2" svg:width="2.767cm" svg:height="0.976cm" svg:x="2.536cm" svg:y="6.542cm"><draw:text-box><text:p>Bois des Lucioles</text:p></draw:text-box></draw:frame><draw:frame text:anchor-type="paragraph" draw:z-index="8" draw:name="Cadre de texte 8" draw:style-name="gr5" draw:text-style-name="P2" svg:width="3.16cm" svg:height="0.948cm" svg:x="6.96cm" svg:y="8.398cm"><draw:text-box><text:p>Les Trois Soeurs</text:p></draw:text-box></draw:frame><draw:frame text:anchor-type="paragraph" draw:z-index="9" draw:name="Cadre de texte 9" draw:style-name="gr4" draw:text-style-name="P4" svg:width="2.567cm" svg:height="1.384cm" svg:x="16.083cm" svg:y="7.885cm"><draw:text-box><text:p><text:span text:style-name="T3">Forêt des Murmures</text:span></text:p></draw:text-box></draw:frame><draw:frame text:anchor-type="paragraph" draw:z-index="10" draw:name="Cadre de texte 10" draw:style-name="gr3" draw:text-style-name="P2" svg:width="2.29cm" svg:height="0.976cm" svg:x="2.379cm" svg:y="12.663cm"><draw:text-box><text:p>Village sur pilotis</text:p></draw:text-box></draw:frame><draw:frame text:anchor-type="paragraph" draw:z-index="11" draw:name="Cadre de texte 11" draw:style-name="gr2" draw:text-style-name="P3" svg:width="3.514cm" svg:height="0.976cm" svg:x="6.646cm" svg:y="13.968cm"><draw:text-box><text:p><text:span text:style-name="T2">Palais du Roi Grenouille</text:span></text:p></draw:text-box></draw:frame><draw:frame text:anchor-type="paragraph" draw:z-index="12" draw:name="Cadre de texte 12" draw:style-name="gr1" draw:text-style-name="P2" svg:width="2.608cm" svg:height="0.83cm" svg:x="-1.57cm" svg:y="12.545cm"><draw:text-box><text:p>Le Gwern</text:p></draw:text-box></draw:frame><draw:frame text:anchor-type="paragraph" draw:z-index="13" draw:name="Cadre de texte 13" draw:style-name="gr1" draw:text-style-name="P1" svg:width="2.804cm" svg:height="0.83cm" svg:x="12.213cm" svg:y="9.781cm"><draw:text-box><text:p><text:span text:style-name="T1">L’Oiselet</text:span></text:p></draw:text-box></draw:frame><draw:frame draw:style-name="fr1" draw:name="Image1" text:anchor-type="char" svg:x="-1.842cm" svg:y="-2cm" svg:width="20.842cm" svg:height="29.7cm" draw:z-index="0"><draw:image xlink:href="Pictures/100000000000043E000005A84E1CB6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22:40:38.594727256</meta:creation-date>
    <dc:date>2026-05-01T23:08:24.430561807</dc:date>
    <meta:editing-duration>PT8M43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